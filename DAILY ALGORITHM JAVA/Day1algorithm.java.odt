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c26" officeooo:paragraph-rsid="00070c26"/>
    </style:style>
    <style:style style:name="P2" style:family="paragraph" style:parent-style-name="Standard">
      <style:text-properties officeooo:rsid="00077820" officeooo:paragraph-rsid="00077820"/>
    </style:style>
    <style:style style:name="P3" style:family="paragraph" style:parent-style-name="Standard">
      <style:text-properties officeooo:rsid="0007d365" officeooo:paragraph-rsid="0007d3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JAVA DAY1 ALGORITHM</text:p>
      <text:p text:style-name="P1"/>
      <text:p text:style-name="P1">PRINT MY NAME</text:p>
      <text:p text:style-name="P1"/>
      <text:p text:style-name="P1"/>
      <text:p text:style-name="P3">DAY1</text:p>
      <text:p text:style-name="P3"/>
      <text:p text:style-name="P1">Problem: Display my name</text:p>
      <text:p text:style-name="P1"/>
      <text:p text:style-name="P1">Agorithm:</text:p>
      <text:p text:style-name="P1">1. Start</text:p>
      <text:p text:style-name="P1">2. Display “my name is Zoe”</text:p>
      <text:p text:style-name="P1">3. End</text:p>
      <text:p text:style-name="P1"/>
      <text:p text:style-name="P1"/>
      <text:p text:style-name="P2">DAY2</text:p>
      <text:p text:style-name="P2"/>
      <text:p text:style-name="P3">Problen: Add two numbers</text:p>
      <text:p text:style-name="P3"/>
      <text:p text:style-name="P3">Algorithm</text:p>
      <text:p text:style-name="P2">1. Start</text:p>
      <text:p text:style-name="P2">2. input first number</text:p>
      <text:p text:style-name="P2">3. input second number</text:p>
      <text:p text:style-name="P2">4. add both number</text:p>
      <text:p text:style-name="P2">5. display the result</text:p>
      <text:p text:style-name="P2">6. end</text:p>
      <text:p text:style-name="P2"/>
      <text:p text:style-name="P3">DAY3</text:p>
      <text:p text:style-name="P3">Problem: Check if a number is even or odd</text:p>
      <text:p text:style-name="P3"/>
      <text:p text:style-name="P3">Algorithm</text:p>
      <text:p text:style-name="P3">1. Start</text:p>
      <text:p text:style-name="P3">2. input a number</text:p>
      <text:p text:style-name="P3">3. divide number by 2</text:p>
      <text:p text:style-name="P3">4. if remainder is 0</text:p>
      <text:p text:style-name="P3"><text:s text:c="4"/>Display even</text:p>
      <text:p text:style-name="P3">5. Else</text:p>
      <text:p text:style-name="P3"><text:s text:c="4"/>Display Odd</text:p>
      <text:p text:style-name="P3">6. End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21:32:50.417593557</meta:creation-date>
    <dc:date>2026-04-10T21:44:11.903930892</dc:date>
    <meta:editing-duration>P1DT7H31M33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28" meta:word-count="83" meta:character-count="407" meta:non-whitespace-character-count="344"/>
  </office:meta>
</office:document-meta>
</file>